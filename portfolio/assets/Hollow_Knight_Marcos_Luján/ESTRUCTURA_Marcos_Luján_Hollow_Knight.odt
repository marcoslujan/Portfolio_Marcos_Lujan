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69a7"/>
    </style:style>
    <style:style style:name="P2" style:family="paragraph" style:parent-style-name="Standard">
      <style:paragraph-properties fo:break-before="page"/>
      <style:text-properties officeooo:rsid="0024c76d" officeooo:paragraph-rsid="0024c76d"/>
    </style:style>
    <style:style style:name="P3" style:family="paragraph" style:parent-style-name="Standard">
      <style:text-properties officeooo:rsid="0024c76d" officeooo:paragraph-rsid="0024c76d"/>
    </style:style>
    <style:style style:name="P4" style:family="paragraph">
      <loext:graphic-properties draw:fill="none" draw:fill-color="#ffffff"/>
    </style:style>
    <style:style style:name="P5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1.78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9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24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02cm" fo:min-width="18.1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11.278cm" fo:min-width="10.26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11.259cm" fo:min-width="7.02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3.029cm" fo:min-width="18.1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8" svg:width="18.199cm" svg:height="3.029cm" svg:x="-0.467cm" svg:y="0.85cm"><text:p/><draw:enhanced-geometry svg:viewBox="0 0 21600 21600" draw:type="rectangle" draw:enhanced-path="M 0 0 L 21600 0 21600 21600 0 21600 0 0 Z N"/></draw:custom-shape><draw:custom-shape text:anchor-type="paragraph" draw:z-index="1" draw:name="Forma 3" draw:style-name="gr7" draw:text-style-name="P5" svg:width="7.026cm" svg:height="11.26cm" svg:x="-0.437cm" svg:y="4.868cm"><text:p><text:s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Forma 2" draw:style-name="gr6" svg:width="10.261cm" svg:height="11.279cm" svg:x="7.47cm" svg:y="4.84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a 4" draw:style-name="gr5" svg:width="18.199cm" svg:height="2.02cm" svg:x="-0.467cm" svg:y="16.852cm"><text:p/><draw:enhanced-geometry svg:viewBox="0 0 21600 21600" draw:type="rectangle" draw:enhanced-path="M 0 0 L 21600 0 21600 21600 0 21600 0 0 Z N"/></draw:custom-shape><draw:frame text:anchor-type="paragraph" draw:z-index="4" draw:name="Marco de texto 1" draw:style-name="gr3" draw:text-style-name="P4" svg:width="3.029cm" svg:height="0.971cm" svg:x="7.108cm" svg:y="1.085cm"><draw:text-box><text:p>&lt;header&gt;</text:p></draw:text-box></draw:frame><draw:frame text:anchor-type="paragraph" draw:z-index="5" draw:name="Marco de texto 2" draw:style-name="gr3" draw:text-style-name="P4" svg:width="3.029cm" svg:height="0.971cm" svg:x="7.108cm" svg:y="2.752cm"><draw:text-box><text:p>&lt;/header&gt;</text:p></draw:text-box></draw:frame><draw:frame text:anchor-type="paragraph" draw:z-index="6" draw:name="Marco de texto 3" draw:style-name="gr3" draw:text-style-name="P4" svg:width="3.029cm" svg:height="0.971cm" svg:x="6.442cm" svg:y="1.752cm"><draw:text-box><text:p>&lt;nav&gt; <text:s text:c="5"/>&lt;/nav&gt;</text:p></draw:text-box></draw:frame><draw:frame text:anchor-type="paragraph" draw:z-index="7" draw:name="Marco de texto 4" draw:style-name="gr3" draw:text-style-name="P4" svg:width="3.029cm" svg:height="0.971cm" svg:x="11.665cm" svg:y="5.752cm"><draw:text-box><text:p>&lt;section&gt;</text:p></draw:text-box></draw:frame><draw:frame text:anchor-type="paragraph" draw:z-index="8" draw:name="Marco de texto 5" draw:style-name="gr3" draw:text-style-name="P4" svg:width="3.029cm" svg:height="0.971cm" svg:x="11.665cm" svg:y="9.419cm"><draw:text-box><text:p>&lt;section&gt;</text:p></draw:text-box></draw:frame><draw:frame text:anchor-type="paragraph" draw:z-index="9" draw:name="Marco de texto 6" draw:style-name="gr4" draw:text-style-name="P4" svg:width="3.029cm" svg:height="2.243cm" svg:x="11.665cm" svg:y="6.752cm"><draw:text-box><text:p>&lt;article&gt;</text:p><text:p/><text:p/><text:p>&lt;/article&gt;</text:p></draw:text-box></draw:frame><draw:frame text:anchor-type="paragraph" draw:z-index="10" draw:name="Marco de texto 7" draw:style-name="gr3" draw:text-style-name="P4" svg:width="3.029cm" svg:height="0.971cm" svg:x="1.997cm" svg:y="5.752cm"><draw:text-box><text:p>&lt;aside&gt;</text:p></draw:text-box></draw:frame><draw:frame text:anchor-type="paragraph" draw:z-index="11" draw:name="Marco de texto 8" draw:style-name="gr3" draw:text-style-name="P4" svg:width="3.029cm" svg:height="0.971cm" svg:x="1.997cm" svg:y="9.753cm"><draw:text-box><text:p>&lt;/aside&gt;</text:p></draw:text-box></draw:frame><draw:frame text:anchor-type="paragraph" draw:z-index="12" draw:name="Marco de texto 9" draw:style-name="gr2" draw:text-style-name="P4" svg:width="3.029cm" svg:height="2.595cm" svg:x="1.997cm" svg:y="6.752cm"><draw:text-box><text:p>&lt;article&gt;</text:p><text:p/><text:p/><text:p>&lt;/article&gt;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13" draw:name="Marco de texto 10" draw:style-name="gr1" draw:text-style-name="P4" svg:width="3.029cm" svg:height="1.786cm" svg:x="6.997cm" svg:y="0.048cm"><draw:text-box><text:p>&lt;footer&gt;</text:p><text:p/><text:p>&lt;/footer&gt;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a cantidad de articulos en las secciones puede variar en función del contenido dependiendo de cada página.</text:p>
      <text:p text:style-name="P3">En la página principal he incrustado una imagen en la cabecera a modo de título, en el aside una imagen a modo de mapa y un video relacionado con el tema. Tambien he puesto varias imagenes en las secciones de cada una de las páginas. En la página de Buscador de Dioses he puesto unas tablas a modo de índice para llegar a la información de abajo , ya que es la página con más contenido de las cinc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3:00:58.939000000</meta:creation-date>
    <dc:date>2023-11-17T23:15:25.468000000</dc:date>
    <meta:editing-duration>PT55M51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" meta:word-count="96" meta:character-count="891" meta:non-whitespace-character-count="412"/>
  </office:meta>
</office:document-meta>
</file>